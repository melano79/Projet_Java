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4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3.09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1.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5.28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19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Fictif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style-name="ce2" office:value-type="date" office:date-value="2026-03-16" calcext:value-type="date">
            <text:p>16-mars</text:p>
          </table:table-cell>
          <table:table-cell table:number-columns-repeated="10"/>
          <table:table-cell table:style-name="ce6" office:value-type="date" office:date-value="2026-05-17" calcext:value-type="date">
            <text:p>17/05/20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  <table:table-cell office:value-type="string" calcext:value-type="string">
            <text:p>semaine 6</text:p>
          </table:table-cell>
          <table:table-cell office:value-type="string" calcext:value-type="string">
            <text:p>semaine 7</text:p>
          </table:table-cell>
          <table:table-cell office:value-type="string" calcext:value-type="string">
            <text:p>semaine 8</text:p>
          </table:table-cell>
          <table:table-cell office:value-type="string" calcext:value-type="string">
            <text:p>semaine 9</text:p>
          </table:table-cell>
          <table:table-cell office:value-type="string" calcext:value-type="string">
            <text:p>semaine 10</text:p>
          </table:table-cell>
          <table:table-cell office:value-type="string" calcext:value-type="string">
            <text:p>semaine 11</text:p>
          </table:table-cell>
          <table:table-cell office:value-type="string" calcext:value-type="string">
            <text:p>semaine 12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travail de recher système solaire et satélites</text:p>
            <text:p> / touver une bd qui correspond</text:p>
          </table:table-cell>
          <table:table-cell table:style-name="ce3" office:value-type="string" calcext:value-type="string">
            <text:p>apprendre a utilister une bd,</text:p>
            <text:p> si on y arrive pas nous nous tournerons</text:p>
            <text:p> vers une mise en place manuel </text:p>
          </table:table-cell>
          <table:table-cell table:style-name="ce3" office:value-type="string" calcext:value-type="string">
            <text:p>apprendre a utilister une bd,</text:p>
            <text:p> si on y arrive pas nous nous tournerons</text:p>
            <text:p> vers une mise en place manuel </text:p>
          </table:table-cell>
          <table:table-cell table:style-name="ce3" office:value-type="string" calcext:value-type="string">
            <text:p>commencement</text:p>
            <text:p> a l'introduction de la bd dans le projet java (dans les objets)</text:p>
          </table:table-cell>
          <table:table-cell table:style-name="ce3" office:value-type="string" calcext:value-type="string">
            <text:p>commencement</text:p>
            <text:p> a l'introduction de la bd dans le projet java (dans les objets)</text:p>
          </table:table-cell>
          <table:table-cell table:style-name="ce3" office:value-type="string" calcext:value-type="string">
            <text:p>création d'une ihm fontionel et simple d'utilisation pour l'app</text:p>
            <text:p/>
          </table:table-cell>
          <table:table-cell table:style-name="ce3" office:value-type="string" calcext:value-type="string">
            <text:p>création d'une ihm fontionel et simple d'utilisation pour l'app</text:p>
            <text:p/>
          </table:table-cell>
          <table:table-cell table:style-name="ce3" office:value-type="string" calcext:value-type="string">
            <text:p>création d'une ihm fontionel et simple d'utilisation pour l'app</text:p>
            <text:p/>
          </table:table-cell>
          <table:table-cell table:style-name="ce3" office:value-type="string" calcext:value-type="string">
            <text:p>création d'une ihm fontionel et simple d'utilisation pour l'app</text:p>
            <text:p/>
          </table:table-cell>
          <table:table-cell table:style-name="ce3" office:value-type="string" calcext:value-type="string">
            <text:p>vidéo explicative</text:p>
            <text:p/>
          </table:table-cell>
          <table:table-cell table:style-name="ce3" office:value-type="string" calcext:value-type="string">
            <text:p>doc technique/doc non technique</text:p>
          </table:table-cell>
          <table:table-cell table:style-name="ce3" office:value-type="string" calcext:value-type="string">
            <text:p>lier les images aux satélites (bonnus)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 table:number-columns-spanned="12" table:number-rows-spanned="1">
            <text:p>création de classes et amélioration ce celles-ci tout au long du projet en fonction des besoins</text:p>
          </table:table-cell>
          <table:covered-table-cell table:number-columns-repeated="11" table:style-name="ce5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12" table:number-rows-spanned="1">
            <text:p>Réalité</text:p>
          </table:table-cell>
          <table:covered-table-cell table:number-columns-repeated="11"/>
          <table:table-cell table:number-columns-repeated="16372"/>
        </table:table-row>
        <table:table-row table:style-name="ro4">
          <table:table-cell table:style-name="ce3" office:value-type="string" calcext:value-type="string">
            <text:p>recherche d'API/de BDD pour le projet </text:p>
          </table:table-cell>
          <table:table-cell table:style-name="ce3" office:value-type="string" calcext:value-type="string">
            <text:p>API trouvée + 1re utilisation/bdd locale trouvée en xlsx + 1re tentative de conversion en .db</text:p>
          </table:table-cell>
          <table:table-cell table:style-name="ce3" office:value-type="string" calcext:value-type="string">
            <text:p>apprendre à utiliser une API et comprendre l'utilité de chaque colonne / préparation de la bdd locale, tentative de conversion en .db réussie</text:p>
          </table:table-cell>
          <table:table-cell table:style-name="ce3" office:value-type="string" calcext:value-type="string">
            <text:p>Répartition des tâches pour la création du code autour de l'API + locale et début de la création d'une IHM / familiarisation de l'utilisation des librairies des java.sql</text:p>
          </table:table-cell>
          <table:table-cell table:number-columns-repeated="2" table:style-name="ce3" office:value-type="string" calcext:value-type="string">
            <text:p><text:s/>développement de la partie graphique de l'ihm pour l'API / Création d'une interface d'invite de commande pour la bdd + familiarisation</text:p>
          </table:table-cell>
          <table:table-cell table:style-name="ce3" office:value-type="string" calcext:value-type="string">
            <text:p><text:s/>développement de la partie graphique de l'ihm pour l'API / Création d'une interface d'invite de commande + création d'une IHM pour la BDD </text:p>
          </table:table-cell>
          <table:table-cell table:style-name="ce3" office:value-type="string" calcext:value-type="string">
            <text:p><text:s/>développement de la partie graphique de l'IHM pour l'API / création d'une IHM plus ergonomique pour l'utilisateur + création d'une partie guidée pour l'utilisation de la BDD </text:p>
          </table:table-cell>
          <table:table-cell table:style-name="ce3" office:value-type="string" calcext:value-type="string">
            <text:p><text:s/>développement de la partie graphique de l'IHM pour l'API / création d'une partie guidée pour l'utilisation de la BDD </text:p>
          </table:table-cell>
          <table:table-cell table:style-name="ce3" office:value-type="string" calcext:value-type="string">
            <text:p><text:s/>développement de la partie graphique de l'IHM pour l'API / création d'une partie guidée pour l'utilisation de la BDD / début de la liaison des programmes et optimisation et débogage</text:p>
          </table:table-cell>
          <table:table-cell table:style-name="ce3" office:value-type="string" calcext:value-type="string">
            <text:p><text:s/>développement de la partie graphique de l'IHM pour l'API / petits rajouts pour le code BDD + débogage et commencement des différentes docs et nettoyage du GitHub</text:p>
          </table:table-cell>
          <table:table-cell table:style-name="ce3" office:value-type="string" calcext:value-type="string">
            <text:p>vidéo / fin fiche technique et fonctionnelle et création d'un exe (à la dernière minute) </text:p>
          </table:table-cell>
          <table:table-cell table:style-name="ce3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 STRAT Mathieu</meta:initial-creator>
    <meta:creation-date>2026-03-09T15:03:07</meta:creation-date>
    <dc:date>2026-05-26T19:27:49.253000000</dc:date>
    <meta:generator>LibreOffice/24.2.3.2$Windows_X86_64 LibreOffice_project/433d9c2ded56988e8a90e6b2e771ee4e6a5ab2ba</meta:generator>
    <meta:editing-duration>PT1M50S</meta:editing-duration>
    <meta:editing-cycles>1</meta:editing-cycles>
    <meta:document-statistic meta:table-count="1" meta:cell-count="41" meta:object-count="0"/>
    <meta:user-defined meta:name="AppVersion">16.0300</meta:user-defined>
  </office:meta>
</office:document-meta>
</file>